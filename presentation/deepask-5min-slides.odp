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slide-01.png" manifest:media-type="image/png"/>
  <manifest:file-entry manifest:full-path="Pictures/slide-02.png" manifest:media-type="image/png"/>
  <manifest:file-entry manifest:full-path="Pictures/slide-03.png" manifest:media-type="image/png"/>
  <manifest:file-entry manifest:full-path="Pictures/slide-04.png" manifest:media-type="image/png"/>
  <manifest:file-entry manifest:full-path="Pictures/slide-05.png" manifest:media-type="image/png"/>
  <manifest:file-entry manifest:full-path="Pictures/slide-06.png" manifest:media-type="image/png"/>
  <manifest:file-entry manifest:full-path="Pictures/slide-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draw="urn:oasis:names:tc:opendocument:xmlns:drawing:1.0" xmlns:svg="urn:oasis:names:tc:opendocument:xmlns:svg-compatible:1.0" xmlns:xlink="http://www.w3.org/1999/xlink" office:version="1.2">
  <office:automatic-styles>
    <style:style style:name="grImage" style:family="graphic">
      <style:graphic-properties draw:stroke="none" draw:fill="none"/>
    </style:style>
    <style:style style:name="dp1" style:family="drawing-page">
      <style:drawing-page-properties draw:fill="solid" draw:fill-color="#fbf8f1"/>
    </style:style>
    <style:style style:name="dp2" style:family="drawing-page">
      <style:drawing-page-properties draw:fill="solid" draw:fill-color="#fbf8f1"/>
    </style:style>
    <style:style style:name="dp3" style:family="drawing-page">
      <style:drawing-page-properties draw:fill="solid" draw:fill-color="#fbf8f1"/>
    </style:style>
    <style:style style:name="dp4" style:family="drawing-page">
      <style:drawing-page-properties draw:fill="solid" draw:fill-color="#fbf8f1"/>
    </style:style>
    <style:style style:name="dp5" style:family="drawing-page">
      <style:drawing-page-properties draw:fill="solid" draw:fill-color="#fbf8f1"/>
    </style:style>
    <style:style style:name="dp6" style:family="drawing-page">
      <style:drawing-page-properties draw:fill="solid" draw:fill-color="#fbf8f1"/>
    </style:style>
    <style:style style:name="dp7" style:family="drawing-page">
      <style:drawing-page-properties draw:fill="solid" draw:fill-color="#fbf8f1"/>
    </style:style>
  </office:automatic-styles>
  <office:body>
    <office:presentation>
      <draw:page draw:name="Slide 1" draw:style-name="dp1" draw:master-page-name="Default">
        <draw:frame draw:name="Slide image 1" draw:style-name="grImage" svg:x="0cm" svg:y="0cm" svg:width="28cm" svg:height="15.75cm">
          <draw:image xlink:href="Pictures/slide-01.png" xlink:type="simple" xlink:show="embed" xlink:actuate="onLoad"/>
        </draw:frame>
      </draw:page>
      <draw:page draw:name="Slide 2" draw:style-name="dp2" draw:master-page-name="Default">
        <draw:frame draw:name="Slide image 2" draw:style-name="grImage" svg:x="0cm" svg:y="0cm" svg:width="28cm" svg:height="15.75cm">
          <draw:image xlink:href="Pictures/slide-02.png" xlink:type="simple" xlink:show="embed" xlink:actuate="onLoad"/>
        </draw:frame>
      </draw:page>
      <draw:page draw:name="Slide 3" draw:style-name="dp3" draw:master-page-name="Default">
        <draw:frame draw:name="Slide image 3" draw:style-name="grImage" svg:x="0cm" svg:y="0cm" svg:width="28cm" svg:height="15.75cm">
          <draw:image xlink:href="Pictures/slide-03.png" xlink:type="simple" xlink:show="embed" xlink:actuate="onLoad"/>
        </draw:frame>
      </draw:page>
      <draw:page draw:name="Slide 4" draw:style-name="dp4" draw:master-page-name="Default">
        <draw:frame draw:name="Slide image 4" draw:style-name="grImage" svg:x="0cm" svg:y="0cm" svg:width="28cm" svg:height="15.75cm">
          <draw:image xlink:href="Pictures/slide-04.png" xlink:type="simple" xlink:show="embed" xlink:actuate="onLoad"/>
        </draw:frame>
      </draw:page>
      <draw:page draw:name="Slide 5" draw:style-name="dp5" draw:master-page-name="Default">
        <draw:frame draw:name="Slide image 5" draw:style-name="grImage" svg:x="0cm" svg:y="0cm" svg:width="28cm" svg:height="15.75cm">
          <draw:image xlink:href="Pictures/slide-05.png" xlink:type="simple" xlink:show="embed" xlink:actuate="onLoad"/>
        </draw:frame>
      </draw:page>
      <draw:page draw:name="Slide 6" draw:style-name="dp6" draw:master-page-name="Default">
        <draw:frame draw:name="Slide image 6" draw:style-name="grImage" svg:x="0cm" svg:y="0cm" svg:width="28cm" svg:height="15.75cm">
          <draw:image xlink:href="Pictures/slide-06.png" xlink:type="simple" xlink:show="embed" xlink:actuate="onLoad"/>
        </draw:frame>
      </draw:page>
      <draw:page draw:name="Slide 7" draw:style-name="dp7" draw:master-page-name="Default">
        <draw:frame draw:name="Slide image 7" draw:style-name="grImage" svg:x="0cm" svg:y="0cm" svg:width="28cm" svg:height="15.75cm">
          <draw:image xlink:href="Pictures/slide-07.png" xlink:type="simple" xlink:show="embed" xlink:actuate="onLoad"/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draw="urn:oasis:names:tc:opendocument:xmlns:drawing:1.0" xmlns:fo="urn:oasis:names:tc:opendocument:xmlns:xsl-fo-compatible:1.0" office:version="1.2">
  <office:automatic-styles>
    <style:page-layout style:name="pm1">
      <style:page-layout-properties fo:page-width="28cm" fo:page-height="15.75cm" style:print-orientation="landscape"/>
    </style:page-layout>
  </office:automatic-styles>
  <office:master-styles>
    <style:master-page style:name="Default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office:version="1.2">
  <office:meta>
    <meta:generator>Codex rendered DeepAsk ODP builder</meta:generator>
    <meta:creation-date>2026-06-23T12:29:42.724826+00:00</meta:creation-date>
    <meta:document-statistic meta:slide-count="7"/>
  </office:meta>
</office:document-meta>
</file>